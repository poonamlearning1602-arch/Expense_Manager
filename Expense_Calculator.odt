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4.128cm"/>
    </style:style>
    <style:style style:name="Table1.1" style:family="table-row">
      <style:table-row-properties fo:keep-together="auto"/>
    </style:style>
    <style:style style:name="Table1.A1" style:family="table-cell">
      <style:table-cell-properties fo:background-color="#2e75b6" fo:padding-left="0.212cm" fo:padding-right="0.212cm" fo:padding-top="0.141cm" fo:padding-bottom="0.141cm" fo:border="0.1pt solid #cccccc">
        <style:background-image/>
      </style:table-cell-properties>
    </style:style>
    <style:style style:name="Table1.A2" style:family="table-cell">
      <style:table-cell-properties fo:background-color="#ffffff" fo:padding-left="0.212cm" fo:padding-right="0.212cm" fo:padding-top="0.141cm" fo:padding-bottom="0.141cm" fo:border="0.1pt solid #cccccc">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3.096cm"/>
    </style:style>
    <style:style style:name="Table2.B" style:family="table-column">
      <style:table-column-properties style:column-width="6.706cm"/>
    </style:style>
    <style:style style:name="Table2.C" style:family="table-column">
      <style:table-column-properties style:column-width="6.708cm"/>
    </style:style>
    <style:style style:name="Table2.1" style:family="table-row">
      <style:table-row-properties fo:keep-together="auto"/>
    </style:style>
    <style:style style:name="Table2.A1" style:family="table-cell">
      <style:table-cell-properties fo:background-color="#2e75b6" fo:padding-left="0.212cm" fo:padding-right="0.212cm" fo:padding-top="0.141cm" fo:padding-bottom="0.141cm" fo:border="0.1pt solid #cccccc">
        <style:background-image/>
      </style:table-cell-properties>
    </style:style>
    <style:style style:name="Table2.A2" style:family="table-cell">
      <style:table-cell-properties fo:background-color="#ffffff" fo:padding-left="0.212cm" fo:padding-right="0.212cm" fo:padding-top="0.141cm" fo:padding-bottom="0.141cm" fo:border="0.1pt solid #cccccc">
        <style:background-image/>
      </style:table-cell-properties>
    </style:style>
    <style:style style:name="Table2.C2" style:family="table-cell">
      <style:table-cell-properties fo:background-color="#ffffff" fo:padding-left="0.212cm" fo:padding-right="0.212cm" fo:padding-top="0.141cm" fo:padding-bottom="0.141cm" fo:border="0.5pt solid #000000">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2.064cm"/>
    </style:style>
    <style:style style:name="Table3.B" style:family="table-column">
      <style:table-column-properties style:column-width="4.128cm"/>
    </style:style>
    <style:style style:name="Table3.C" style:family="table-column">
      <style:table-column-properties style:column-width="5.159cm"/>
    </style:style>
    <style:style style:name="Table3.1" style:family="table-row">
      <style:table-row-properties fo:keep-together="auto"/>
    </style:style>
    <style:style style:name="Table3.A1" style:family="table-cell">
      <style:table-cell-properties fo:background-color="#2e75b6" fo:padding-left="0.212cm" fo:padding-right="0.212cm" fo:padding-top="0.141cm" fo:padding-bottom="0.141cm" fo:border="0.1pt solid #cccccc">
        <style:background-image/>
      </style:table-cell-properties>
    </style:style>
    <style:style style:name="Table3.A2" style:family="table-cell">
      <style:table-cell-properties fo:background-color="#ffffff" fo:padding-left="0.212cm" fo:padding-right="0.212cm" fo:padding-top="0.141cm" fo:padding-bottom="0.141cm" fo:border="0.1pt solid #cccccc">
        <style:background-image/>
      </style:table-cell-properties>
    </style:style>
    <style:style style:name="P1" style:family="paragraph" style:parent-style-name="Standard">
      <style:paragraph-properties fo:margin-top="0.706cm" fo:margin-bottom="0.176cm" style:contextual-spacing="false" fo:text-align="center" style:justify-single-word="false"/>
      <style:text-properties fo:color="#1f4e78" loext:opacity="100%" fo:font-size="18pt" fo:font-weight="bold" style:font-size-asian="18pt" style:font-weight-asian="bold" style:font-size-complex="18pt" style:font-weight-complex="bold"/>
    </style:style>
    <style:style style:name="P2" style:family="paragraph" style:parent-style-name="Standard">
      <style:paragraph-properties fo:margin-top="0cm" fo:margin-bottom="0.106cm" style:contextual-spacing="false" fo:text-align="center" style:justify-single-word="false"/>
      <style:text-properties fo:color="#2e75b6" loext:opacity="100%" fo:font-size="14pt" style:font-size-asian="14pt" style:font-size-complex="14pt"/>
    </style:style>
    <style:style style:name="P3" style:family="paragraph" style:parent-style-name="Standard">
      <style:paragraph-properties fo:margin-top="0cm" fo:margin-bottom="0.706cm" style:contextual-spacing="false" fo:text-align="center" style:justify-single-word="false"/>
      <style:text-properties fo:font-size="12pt" style:font-size-asian="12pt" style:font-size-complex="12pt"/>
    </style:style>
    <style:style style:name="P4" style:family="paragraph" style:parent-style-name="Standard">
      <style:paragraph-properties fo:margin-top="0.529cm" fo:margin-bottom="0.176cm" style:contextual-spacing="false"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margin-top="0cm" fo:margin-bottom="0.529cm" style:contextual-spacing="false" fo:text-align="center" style:justify-single-word="false"/>
      <style:text-properties fo:font-size="11pt" style:font-size-asian="11pt" style:font-size-complex="11pt"/>
    </style:style>
    <style:style style:name="P6" style:family="paragraph" style:parent-style-name="Standard">
      <style:paragraph-properties fo:margin-top="0.706cm" fo:margin-bottom="0.088cm" style:contextual-spacing="false" fo:text-align="center" style:justify-single-word="false"/>
      <style:text-properties fo:font-weight="bold" style:font-weight-asian="bold" style:font-weight-complex="bold"/>
    </style:style>
    <style:style style:name="P7" style:family="paragraph" style:parent-style-name="Standard">
      <style:paragraph-properties fo:margin-top="0cm" fo:margin-bottom="0.176cm" style:contextual-spacing="false" fo:text-align="center" style:justify-single-word="false"/>
    </style:style>
    <style:style style:name="P8" style:family="paragraph" style:parent-style-name="List_20_Paragraph" style:list-style-name="WWNum2"/>
    <style:style style:name="P9" style:family="paragraph" style:parent-style-name="Standard">
      <style:paragraph-properties fo:margin-top="0cm" fo:margin-bottom="0.212cm" style:contextual-spacing="false"/>
    </style:style>
    <style:style style:name="P10" style:family="paragraph" style:parent-style-name="Heading_20_2">
      <style:paragraph-properties fo:margin-top="0cm" fo:margin-bottom="0.212cm" style:contextual-spacing="false"/>
    </style:style>
    <style:style style:name="P11" style:family="paragraph" style:parent-style-name="List_20_Paragraph" style:list-style-name="WWNum3">
      <style:paragraph-properties fo:margin-top="0cm" fo:margin-bottom="0.212cm" style:contextual-spacing="false"/>
    </style:style>
    <style:style style:name="P12" style:family="paragraph" style:parent-style-name="List_20_Paragraph" style:list-style-name="WWNum3"/>
    <style:style style:name="P13" style:family="paragraph" style:parent-style-name="List_20_Paragraph" style:list-style-name="WWNum3">
      <style:paragraph-properties fo:margin-top="0cm" fo:margin-bottom="0.353cm" style:contextual-spacing="false"/>
    </style:style>
    <style:style style:name="P14" style:family="paragraph" style:parent-style-name="List_20_Paragraph" style:list-style-name="WWNum3">
      <style:paragraph-properties fo:margin-top="0cm" fo:margin-bottom="0.176cm" style:contextual-spacing="false"/>
    </style:style>
    <style:style style:name="P15" style:family="paragraph" style:parent-style-name="Standard">
      <style:paragraph-properties fo:text-align="center" style:justify-single-word="false"/>
      <style:text-properties fo:color="#ffffff" loext:opacity="100%" fo:font-size="11pt" fo:font-weight="bold" style:font-size-asian="11pt" style:font-weight-asian="bold" style:font-size-complex="11pt" style:font-weight-complex="bold"/>
    </style:style>
    <style:style style:name="P16" style:family="paragraph" style:parent-style-name="Standard">
      <style:paragraph-properties fo:text-align="left" style:justify-single-word="false"/>
      <style:text-properties fo:font-size="11pt" style:font-size-asian="11pt" style:font-size-complex="11pt"/>
    </style:style>
    <style:style style:name="P17" style:family="paragraph" style:parent-style-name="Standard">
      <style:paragraph-properties fo:text-align="left" style:justify-single-word="false"/>
    </style:style>
    <style:style style:name="P18" style:family="paragraph" style:parent-style-name="Standard">
      <style:paragraph-properties fo:margin-top="0.212cm" fo:margin-bottom="0.212cm" style:contextual-spacing="false"/>
    </style:style>
    <style:style style:name="P19" style:family="paragraph" style:parent-style-name="Standard">
      <style:paragraph-properties fo:margin-top="0.176cm" fo:margin-bottom="0.176cm" style:contextual-spacing="false"/>
    </style:style>
    <style:style style:name="P20" style:family="paragraph" style:parent-style-name="Standard">
      <style:paragraph-properties fo:margin-top="0cm" fo:margin-bottom="0.176cm" style:contextual-spacing="false"/>
    </style:style>
    <style:style style:name="P21" style:family="paragraph" style:parent-style-name="Standard">
      <style:paragraph-properties fo:margin-top="0.212cm" fo:margin-bottom="0.353cm" style:contextual-spacing="false"/>
    </style:style>
    <style:style style:name="P22" style:family="paragraph" style:parent-style-name="Standard">
      <style:paragraph-properties fo:margin-top="0.353cm" fo:margin-bottom="0.176cm" style:contextual-spacing="false" fo:text-align="center" style:justify-single-word="false" fo:padding-left="0cm" fo:padding-right="0cm" fo:padding-top="0.035cm" fo:padding-bottom="0cm" fo:border-left="none" fo:border-right="none" fo:border-top="0.74pt solid #2e75b6" fo:border-bottom="none"/>
    </style:style>
    <style:style style:name="T1"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SINESS REQUIREMENT DOCUMENT</text:p>
      <text:p text:style-name="P2">Expense Calculator &amp; Manager Application</text:p>
      <text:p text:style-name="P3">v1.0 - Single User Edition</text:p>
      <text:p text:style-name="Standard"/>
      <text:p text:style-name="P4">Document Prepared For</text:p>
      <text:p text:style-name="P5">Development &amp; Stakeholder Review</text:p>
      <text:p text:style-name="P6">Document Date:</text:p>
      <text:p text:style-name="P7">June 2026</text:p>
      <text:h text:style-name="Heading_20_1" text:outline-level="1">Table of Contents</text:h>
      <text:list text:style-name="WWNum2">
        <text:list-item text:start-value="1">
          <text:p text:style-name="P8">Executive Summary</text:p>
        </text:list-item>
        <text:list-item>
          <text:p text:style-name="P8">Product Overview</text:p>
        </text:list-item>
        <text:list-item>
          <text:p text:style-name="P8">Functional Requirements</text:p>
        </text:list-item>
        <text:list-item>
          <text:p text:style-name="P8">Non-Functional Requirements</text:p>
        </text:list-item>
        <text:list-item>
          <text:p text:style-name="P8">User Interface Design</text:p>
        </text:list-item>
        <text:list-item>
          <text:p text:style-name="P8">Technical Architecture</text:p>
        </text:list-item>
        <text:list-item>
          <text:p text:style-name="P8">Data Models</text:p>
        </text:list-item>
        <text:list-item>
          <text:p text:style-name="P8">Security &amp; Privacy</text:p>
        </text:list-item>
      </text:list>
      <text:h text:style-name="Heading_20_1" text:outline-level="1">1. Executive Summary</text:h>
      <text:p text:style-name="P9">The Expense Calculator &amp; Manager is a comprehensive personal financial management application designed to help individuals track, categorize, and analyze their spending patterns. The application will be available across web browsers, Android mobile devices, and desktop platforms to ensure accessibility and convenience for users in their daily financial management activities.</text:p>
      <text:h text:style-name="P10" text:outline-level="2">1.1 Product Vision</text:h>
      <text:p text:style-name="P9">Empower individual users to gain complete control and visibility over their personal finances through an intuitive, feature-rich expense management platform.</text:p>
      <text:h text:style-name="P10" text:outline-level="2">1.2 Target Audience</text:h>
      <text:list text:style-name="WWNum3">
        <text:list-item text:start-value="1">
          <text:p text:style-name="P11">Individual users seeking personal finance management and budgeting tools</text:p>
        </text:list-item>
      </text:list>
      <text:h text:style-name="P10" text:outline-level="2">1.3 Key Deliverables</text:h>
      <text:list text:continue-numbering="true" text:style-name="WWNum3">
        <text:list-item>
          <text:p text:style-name="P12">Responsive web application (modern browsers)</text:p>
        </text:list-item>
        <text:list-item>
          <text:p text:style-name="P12">Native Android mobile application</text:p>
        </text:list-item>
        <text:list-item>
          <text:p text:style-name="P12">Cross-platform desktop application (Windows/Mac/Linux)</text:p>
        </text:list-item>
        <text:list-item>
          <text:p text:style-name="P13">Comprehensive analytics and reporting features</text:p>
        </text:list-item>
      </text:list>
      <text:h text:style-name="Heading_20_1" text:outline-level="1">2. Product Overview</text:h>
      <text:h text:style-name="P10" text:outline-level="2">2.1 Application Description</text:h>
      <text:p text:style-name="P9">The Expense Calculator &amp; Manager is a multi-platform personal finance application that <text:soft-page-break/>allows users to record, categorize, and analyze their financial transactions. The application supports both expense tracking and income recording, enabling users to maintain a comprehensive view of their financial health. It includes budget management capabilities, recurring expense automation, and detailed analytics with visualizations.</text:p>
      <text:h text:style-name="P10" text:outline-level="2">2.2 Core Features</text:h>
      <text:list text:continue-numbering="true" text:style-name="WWNum3">
        <text:list-item>
          <text:p text:style-name="P12">Real-time expense and income tracking</text:p>
        </text:list-item>
        <text:list-item>
          <text:p text:style-name="P12">Multi-category organization system</text:p>
        </text:list-item>
        <text:list-item>
          <text:p text:style-name="P12">Budget management and monitoring</text:p>
        </text:list-item>
        <text:list-item>
          <text:p text:style-name="P12">Advanced analytics and reporting</text:p>
        </text:list-item>
        <text:list-item>
          <text:p text:style-name="P13">Cross-platform synchronization</text:p>
        </text:list-item>
      </text:list>
      <text:h text:style-name="Heading_20_1" text:outline-level="1">3. Functional Requirements</text:h>
      <text:h text:style-name="Heading_20_2" text:outline-level="2">3.1 Transaction Management</text:h>
      <text:h text:style-name="Heading_20_3" text:outline-level="3">3.1.1 Add Expense</text:h>
      <text:list text:continue-numbering="true" text:style-name="WWNum3">
        <text:list-item>
          <text:p text:style-name="P12">Users must be able to add a new expense with the following mandatory fields:</text:p>
        </text:list-item>
        <text:list-item>
          <text:p text:style-name="P12">Amount (numeric, supporting decimal values)</text:p>
        </text:list-item>
        <text:list-item>
          <text:p text:style-name="P12">Category (predefined or custom)</text:p>
        </text:list-item>
        <text:list-item>
          <text:p text:style-name="P12">Date (with time, defaults to current date/time)</text:p>
        </text:list-item>
        <text:list-item>
          <text:p text:style-name="P12">Description/Notes (optional, max 500 characters)</text:p>
        </text:list-item>
        <text:list-item>
          <text:p text:style-name="P12">Payment method (Cash, Credit Card, Debit Card, Digital Wallet, Bank Transfer)</text:p>
        </text:list-item>
        <text:list-item>
          <text:p text:style-name="P14">Recipient/Vendor name (optional)</text:p>
        </text:list-item>
        <text:list-item>
          <text:p text:style-name="P12">Form validation must be performed client-side and server-side</text:p>
        </text:list-item>
        <text:list-item>
          <text:p text:style-name="P11">Expense entry must be saved to the database immediately after submission</text:p>
        </text:list-item>
      </text:list>
      <text:h text:style-name="Heading_20_3" text:outline-level="3">3.1.2 Edit Expense</text:h>
      <text:list text:continue-numbering="true" text:style-name="WWNum3">
        <text:list-item>
          <text:p text:style-name="P12">Users must be able to modify any existing expense</text:p>
        </text:list-item>
        <text:list-item>
          <text:p text:style-name="P12">All fields must be editable except creation timestamp</text:p>
        </text:list-item>
        <text:list-item>
          <text:p text:style-name="P11">Edit history must be logged for audit purposes</text:p>
        </text:list-item>
      </text:list>
      <text:h text:style-name="Heading_20_3" text:outline-level="3">3.1.3 Delete Expense</text:h>
      <text:list text:continue-numbering="true" text:style-name="WWNum3">
        <text:list-item>
          <text:p text:style-name="P12">Users must be able to delete expenses</text:p>
        </text:list-item>
        <text:list-item>
          <text:p text:style-name="P12">Deletion requires a confirmation dialog to prevent accidental removal</text:p>
        </text:list-item>
        <text:list-item>
          <text:p text:style-name="P12">Soft delete mechanism must be used to preserve audit trails</text:p>
        </text:list-item>
        <text:list-item>
          <text:p text:style-name="P11">Deleted expenses must not appear in calculations or reports</text:p>
        </text:list-item>
      </text:list>
      <text:h text:style-name="Heading_20_3" text:outline-level="3">3.1.4 Add Income</text:h>
      <text:list text:continue-numbering="true" text:style-name="WWNum3">
        <text:list-item>
          <text:p text:style-name="P12">Users must be able to record income with mandatory fields:</text:p>
        </text:list-item>
        <text:list-item>
          <text:p text:style-name="P12">Amount (numeric, decimal support)</text:p>
        </text:list-item>
        <text:list-item>
          <text:p text:style-name="P12">Income category (Salary, Freelance, Investment, Bonus, Other)</text:p>
        </text:list-item>
        <text:list-item>
          <text:p text:style-name="P12">Date received</text:p>
        </text:list-item>
        <text:list-item>
          <text:p text:style-name="P12">Source/Description</text:p>
        </text:list-item>
        <text:list-item>
          <text:p text:style-name="P11">Income entries must be clearly distinguished from expenses in UI</text:p>
        </text:list-item>
      </text:list>
      <text:h text:style-name="Heading_20_2" text:outline-level="2">3.2 Category Management</text:h>
      <text:h text:style-name="Heading_20_3" text:outline-level="3">3.2.1 Predefined Categories</text:h>
      <text:list text:continue-numbering="true" text:style-name="WWNum3">
        <text:list-item>
          <text:p text:style-name="P12">System must provide default expense categories:</text:p>
        </text:list-item>
        <text:list-item>
          <text:p text:style-name="P12">Food &amp; Dining</text:p>
        </text:list-item>
        <text:list-item>
          <text:p text:style-name="P12">Transportation</text:p>
        </text:list-item>
        <text:list-item>
          <text:p text:style-name="P12">Housing &amp; Utilities</text:p>
        </text:list-item>
        <text:list-item>
          <text:p text:style-name="P12"><text:soft-page-break/>Entertainment</text:p>
        </text:list-item>
        <text:list-item>
          <text:p text:style-name="P12">Shopping &amp; Retail</text:p>
        </text:list-item>
        <text:list-item>
          <text:p text:style-name="P12">Healthcare</text:p>
        </text:list-item>
        <text:list-item>
          <text:p text:style-name="P12">Education</text:p>
        </text:list-item>
        <text:list-item>
          <text:p text:style-name="P12">Subscription &amp; Memberships</text:p>
        </text:list-item>
        <text:list-item>
          <text:p text:style-name="P12">Insurance</text:p>
        </text:list-item>
        <text:list-item>
          <text:p text:style-name="P12">Gifts &amp; Donations</text:p>
        </text:list-item>
        <text:list-item>
          <text:p text:style-name="P11">Personal Care</text:p>
        </text:list-item>
      </text:list>
      <text:h text:style-name="Heading_20_3" text:outline-level="3">3.2.2 Custom Categories</text:h>
      <text:list text:continue-numbering="true" text:style-name="WWNum3">
        <text:list-item>
          <text:p text:style-name="P12">Users must be able to create custom categories</text:p>
        </text:list-item>
        <text:list-item>
          <text:p text:style-name="P12">Custom categories must support icons and color coding</text:p>
        </text:list-item>
        <text:list-item>
          <text:p text:style-name="P12">Users must be able to edit and delete custom categories</text:p>
        </text:list-item>
        <text:list-item>
          <text:p text:style-name="P11">Category deletion must be prevented if expenses exist in that category</text:p>
        </text:list-item>
      </text:list>
      <text:h text:style-name="Heading_20_2" text:outline-level="2">3.3 Budget Management</text:h>
      <text:h text:style-name="Heading_20_3" text:outline-level="3">3.3.1 Set Budget</text:h>
      <text:list text:continue-numbering="true" text:style-name="WWNum3">
        <text:list-item>
          <text:p text:style-name="P12">Users must be able to set monthly budgets for each category</text:p>
        </text:list-item>
        <text:list-item>
          <text:p text:style-name="P12">Budget can be set as a percentage of income or fixed amount</text:p>
        </text:list-item>
        <text:list-item>
          <text:p text:style-name="P12">System must allow adjustment of budgets mid-month</text:p>
        </text:list-item>
        <text:list-item>
          <text:p text:style-name="P14">Overall monthly budget must be settable across all categories</text:p>
        </text:list-item>
      </text:list>
      <text:h text:style-name="Heading_20_3" text:outline-level="3">3.3.2 Budget Tracking</text:h>
      <text:list text:continue-numbering="true" text:style-name="WWNum3">
        <text:list-item>
          <text:p text:style-name="P12">System must display budget utilization as percentage</text:p>
        </text:list-item>
        <text:list-item>
          <text:p text:style-name="P12">Visual indicators (progress bars) must show budget status:</text:p>
        </text:list-item>
        <text:list-item>
          <text:p text:style-name="P12">Green: 0-75% of budget used</text:p>
        </text:list-item>
        <text:list-item>
          <text:p text:style-name="P12">Yellow: 75-90% of budget used</text:p>
        </text:list-item>
        <text:list-item>
          <text:p text:style-name="P12">Red: 90%+ of budget used (over budget)</text:p>
        </text:list-item>
        <text:list-item>
          <text:p text:style-name="P11">Alerts must notify users when approaching or exceeding budget limits</text:p>
        </text:list-item>
      </text:list>
      <text:h text:style-name="Heading_20_2" text:outline-level="2">3.4 Recurring Expenses</text:h>
      <text:h text:style-name="Heading_20_3" text:outline-level="3">3.4.1 Create Recurring Expense</text:h>
      <text:list text:continue-numbering="true" text:style-name="WWNum3">
        <text:list-item>
          <text:p text:style-name="P12">Users must be able to set up recurring expenses (e.g., rent, subscriptions)</text:p>
        </text:list-item>
        <text:list-item>
          <text:p text:style-name="P12">Recurrence options: Daily, Weekly, Bi-weekly, Monthly, Quarterly, Annually</text:p>
        </text:list-item>
        <text:list-item>
          <text:p text:style-name="P12">Users must specify:</text:p>
        </text:list-item>
        <text:list-item>
          <text:p text:style-name="P12">Start date</text:p>
        </text:list-item>
        <text:list-item>
          <text:p text:style-name="P12">End date (optional, for limited recurring expenses)</text:p>
        </text:list-item>
        <text:list-item>
          <text:p text:style-name="P12">Amount</text:p>
        </text:list-item>
        <text:list-item>
          <text:p text:style-name="P14">Category</text:p>
        </text:list-item>
      </text:list>
      <text:h text:style-name="Heading_20_3" text:outline-level="3">3.4.2 Auto-Populate Recurring Expenses</text:h>
      <text:list text:continue-numbering="true" text:style-name="WWNum3">
        <text:list-item>
          <text:p text:style-name="P12">System must automatically create expense entries on scheduled dates</text:p>
        </text:list-item>
        <text:list-item>
          <text:p text:style-name="P12">Background job must run daily at midnight to process due recurring expenses</text:p>
        </text:list-item>
        <text:list-item>
          <text:p text:style-name="P11">Users must be notified of automatically added expenses</text:p>
        </text:list-item>
      </text:list>
      <text:h text:style-name="Heading_20_2" text:outline-level="2">3.5 Search &amp; Filter</text:h>
      <text:h text:style-name="Heading_20_3" text:outline-level="3">3.5.1 Filter by Date Range</text:h>
      <text:list text:continue-numbering="true" text:style-name="WWNum3">
        <text:list-item>
          <text:p text:style-name="P12">Users must filter expenses by:</text:p>
        </text:list-item>
        <text:list-item>
          <text:p text:style-name="P12">Specific date</text:p>
        </text:list-item>
        <text:list-item>
          <text:p text:style-name="P12">Date range (from-to)</text:p>
        </text:list-item>
        <text:list-item>
          <text:p text:style-name="P12">This month, last month, this year, last year (quick filters)</text:p>
        </text:list-item>
        <text:list-item>
          <text:p text:style-name="P14"><text:soft-page-break/>Custom date range picker</text:p>
        </text:list-item>
      </text:list>
      <text:h text:style-name="Heading_20_3" text:outline-level="3">3.5.2 Filter by Category</text:h>
      <text:list text:continue-numbering="true" text:style-name="WWNum3">
        <text:list-item>
          <text:p text:style-name="P12">Users must filter expenses by single or multiple categories</text:p>
        </text:list-item>
        <text:list-item>
          <text:p text:style-name="P14">Filter must support AND/OR logic for multiple selections</text:p>
        </text:list-item>
      </text:list>
      <text:h text:style-name="Heading_20_3" text:outline-level="3">3.5.3 Filter by Amount</text:h>
      <text:list text:continue-numbering="true" text:style-name="WWNum3">
        <text:list-item>
          <text:p text:style-name="P12">Users must be able to filter expenses by amount range</text:p>
        </text:list-item>
        <text:list-item>
          <text:p text:style-name="P14">Min/max amount input with validation</text:p>
        </text:list-item>
      </text:list>
      <text:h text:style-name="Heading_20_3" text:outline-level="3">3.5.4 Search</text:h>
      <text:list text:continue-numbering="true" text:style-name="WWNum3">
        <text:list-item>
          <text:p text:style-name="P12">Full-text search across expense descriptions and vendor names</text:p>
        </text:list-item>
        <text:list-item>
          <text:p text:style-name="P11">Search results must be displayed in real-time as user types</text:p>
        </text:list-item>
      </text:list>
      <text:h text:style-name="Heading_20_2" text:outline-level="2">3.6 Analytics &amp; Reporting</text:h>
      <text:h text:style-name="Heading_20_3" text:outline-level="3">3.6.1 Dashboard Summary</text:h>
      <text:list text:continue-numbering="true" text:style-name="WWNum3">
        <text:list-item>
          <text:p text:style-name="P12">Dashboard must display at a glance:</text:p>
        </text:list-item>
        <text:list-item>
          <text:p text:style-name="P12">Total income (current month)</text:p>
        </text:list-item>
        <text:list-item>
          <text:p text:style-name="P12">Total expenses (current month)</text:p>
        </text:list-item>
        <text:list-item>
          <text:p text:style-name="P12">Net balance (income - expenses)</text:p>
        </text:list-item>
        <text:list-item>
          <text:p text:style-name="P12">Savings rate percentage</text:p>
        </text:list-item>
        <text:list-item>
          <text:p text:style-name="P14">Quick stats cards with trends (up/down indicators)</text:p>
        </text:list-item>
      </text:list>
      <text:h text:style-name="Heading_20_3" text:outline-level="3">3.6.2 Category Breakdown</text:h>
      <text:list text:continue-numbering="true" text:style-name="WWNum3">
        <text:list-item>
          <text:p text:style-name="P12">Pie chart showing spending by category</text:p>
        </text:list-item>
        <text:list-item>
          <text:p text:style-name="P12">Bar chart for comparison of top categories</text:p>
        </text:list-item>
        <text:list-item>
          <text:p text:style-name="P12">Table view with category, amount, and percentage</text:p>
        </text:list-item>
        <text:list-item>
          <text:p text:style-name="P14">Interactive charts with hover tooltips and legend</text:p>
        </text:list-item>
      </text:list>
      <text:h text:style-name="Heading_20_3" text:outline-level="3">3.6.3 Monthly Trends</text:h>
      <text:list text:continue-numbering="true" text:style-name="WWNum3">
        <text:list-item>
          <text:p text:style-name="P12">Line chart showing spending trends over last 12 months</text:p>
        </text:list-item>
        <text:list-item>
          <text:p text:style-name="P12">Compare expense vs income over time</text:p>
        </text:list-item>
        <text:list-item>
          <text:p text:style-name="P12">Year-over-year comparison capability</text:p>
        </text:list-item>
        <text:list-item>
          <text:p text:style-name="P14">Customizable date range for trend analysis</text:p>
        </text:list-item>
      </text:list>
      <text:h text:style-name="Heading_20_3" text:outline-level="3">3.6.4 Reports</text:h>
      <text:list text:continue-numbering="true" text:style-name="WWNum3">
        <text:list-item>
          <text:p text:style-name="P12">Generate monthly expense reports</text:p>
        </text:list-item>
        <text:list-item>
          <text:p text:style-name="P12">Export to CSV format</text:p>
        </text:list-item>
        <text:list-item>
          <text:p text:style-name="P12">Export to PDF format</text:p>
        </text:list-item>
        <text:list-item>
          <text:p text:style-name="P11">Summary reports with key metrics and insights</text:p>
        </text:list-item>
      </text:list>
      <text:h text:style-name="Heading_20_2" text:outline-level="2">3.7 Data Import &amp; Export</text:h>
      <text:h text:style-name="Heading_20_3" text:outline-level="3">3.7.1 Export</text:h>
      <text:list text:continue-numbering="true" text:style-name="WWNum3">
        <text:list-item>
          <text:p text:style-name="P12">Export all expenses to CSV format</text:p>
        </text:list-item>
        <text:list-item>
          <text:p text:style-name="P12">Export filtered data (by date, category, etc.)</text:p>
        </text:list-item>
        <text:list-item>
          <text:p text:style-name="P12">Export reports to PDF</text:p>
        </text:list-item>
        <text:list-item>
          <text:p text:style-name="P14">CSV structure: Date | Amount | Category | Description | Payment Method</text:p>
        </text:list-item>
      </text:list>
      <text:h text:style-name="Heading_20_3" text:outline-level="3">3.7.2 Import</text:h>
      <text:list text:continue-numbering="true" text:style-name="WWNum3">
        <text:list-item>
          <text:p text:style-name="P12">Import expenses from CSV file</text:p>
        </text:list-item>
        <text:list-item>
          <text:p text:style-name="P12">CSV header mapping functionality</text:p>
        </text:list-item>
        <text:list-item>
          <text:p text:style-name="P12"><text:soft-page-break/>Validation errors must be displayed with row numbers</text:p>
        </text:list-item>
        <text:list-item>
          <text:p text:style-name="P11">Duplicate detection to prevent re-importing same expenses</text:p>
        </text:list-item>
      </text:list>
      <text:h text:style-name="Heading_20_2" text:outline-level="2">3.8 Notifications</text:h>
      <text:h text:style-name="Heading_20_3" text:outline-level="3">3.8.1 Budget Alerts</text:h>
      <text:list text:continue-numbering="true" text:style-name="WWNum3">
        <text:list-item>
          <text:p text:style-name="P12">Notification when category spending reaches 75% of budget</text:p>
        </text:list-item>
        <text:list-item>
          <text:p text:style-name="P12">Alert when category budget is exceeded</text:p>
        </text:list-item>
        <text:list-item>
          <text:p text:style-name="P14">Push notifications (if applicable for mobile)</text:p>
        </text:list-item>
      </text:list>
      <text:h text:style-name="Heading_20_3" text:outline-level="3">3.8.2 Recurring Expense Notifications</text:h>
      <text:list text:continue-numbering="true" text:style-name="WWNum3">
        <text:list-item>
          <text:p text:style-name="P12">Notify when upcoming recurring expenses are due</text:p>
        </text:list-item>
        <text:list-item>
          <text:p text:style-name="P11">Notification when recurring expense is automatically added</text:p>
        </text:list-item>
      </text:list>
      <text:h text:style-name="Heading_20_1" text:outline-level="1">4. Non-Functional Requirements</text:h>
      <text:h text:style-name="Heading_20_2" text:outline-level="2">4.1 Performance</text:h>
      <text:list text:continue-numbering="true" text:style-name="WWNum3">
        <text:list-item>
          <text:p text:style-name="P12">Page load time: &lt; 2 seconds for initial load</text:p>
        </text:list-item>
        <text:list-item>
          <text:p text:style-name="P12">Dashboard load time: &lt; 1 second</text:p>
        </text:list-item>
        <text:list-item>
          <text:p text:style-name="P12">Search results: &lt; 500ms for 10,000 transactions</text:p>
        </text:list-item>
        <text:list-item>
          <text:p text:style-name="P12">Chart rendering: &lt; 1 second</text:p>
        </text:list-item>
        <text:list-item>
          <text:p text:style-name="P12">API response time: &lt; 300ms for 95th percentile</text:p>
        </text:list-item>
        <text:list-item>
          <text:p text:style-name="P11">Database queries: Optimized with proper indexing</text:p>
        </text:list-item>
      </text:list>
      <text:h text:style-name="Heading_20_2" text:outline-level="2">4.2 Scalability</text:h>
      <text:list text:continue-numbering="true" text:style-name="WWNum3">
        <text:list-item>
          <text:p text:style-name="P12">Support minimum 100,000 concurrent users</text:p>
        </text:list-item>
        <text:list-item>
          <text:p text:style-name="P12">Handle 1,000,000+ transactions per user</text:p>
        </text:list-item>
        <text:list-item>
          <text:p text:style-name="P12">Horizontal scaling for backend services</text:p>
        </text:list-item>
        <text:list-item>
          <text:p text:style-name="P11">Database sharding strategy for large datasets</text:p>
        </text:list-item>
      </text:list>
      <text:h text:style-name="Heading_20_2" text:outline-level="2">4.3 Reliability &amp; Availability</text:h>
      <text:list text:continue-numbering="true" text:style-name="WWNum3">
        <text:list-item>
          <text:p text:style-name="P12">System uptime: 99.9% availability SLA</text:p>
        </text:list-item>
        <text:list-item>
          <text:p text:style-name="P12">Automated backups: Hourly backups to geographically distributed locations</text:p>
        </text:list-item>
        <text:list-item>
          <text:p text:style-name="P12">Disaster recovery: RTO 1 hour, RPO 30 minutes</text:p>
        </text:list-item>
        <text:list-item>
          <text:p text:style-name="P12">Health monitoring with automated alerts</text:p>
        </text:list-item>
        <text:list-item>
          <text:p text:style-name="P11">Graceful degradation during service issues</text:p>
        </text:list-item>
      </text:list>
      <text:h text:style-name="Heading_20_2" text:outline-level="2">4.4 Compatibility</text:h>
      <text:h text:style-name="Heading_20_3" text:outline-level="3">4.4.1 Web Browser</text:h>
      <text:list text:continue-numbering="true" text:style-name="WWNum3">
        <text:list-item>
          <text:p text:style-name="P12">Chrome/Edge: Latest 2 versions</text:p>
        </text:list-item>
        <text:list-item>
          <text:p text:style-name="P12">Firefox: Latest 2 versions</text:p>
        </text:list-item>
        <text:list-item>
          <text:p text:style-name="P12">Safari: Latest 2 versions</text:p>
        </text:list-item>
        <text:list-item>
          <text:p text:style-name="P14">Mobile browsers: Safari (iOS), Chrome (Android)</text:p>
        </text:list-item>
      </text:list>
      <text:h text:style-name="Heading_20_3" text:outline-level="3">4.4.2 Mobile Platforms</text:h>
      <text:list text:continue-numbering="true" text:style-name="WWNum3">
        <text:list-item>
          <text:p text:style-name="P12">Android: Version 8.0 and above</text:p>
        </text:list-item>
        <text:list-item>
          <text:p text:style-name="P14">Screen sizes: 4.5" to 6.7" (phones) and tablets</text:p>
        </text:list-item>
      </text:list>
      <text:h text:style-name="Heading_20_3" text:outline-level="3">4.4.3 Desktop</text:h>
      <text:list text:continue-numbering="true" text:style-name="WWNum3">
        <text:list-item>
          <text:p text:style-name="P12">Windows 10 and above</text:p>
        </text:list-item>
        <text:list-item>
          <text:p text:style-name="P12">macOS 10.13 and above</text:p>
        </text:list-item>
        <text:list-item>
          <text:p text:style-name="P11"><text:soft-page-break/>Linux: Ubuntu 18.04 LTS and above</text:p>
        </text:list-item>
      </text:list>
      <text:h text:style-name="Heading_20_2" text:outline-level="2">4.5 Usability &amp; Accessibility</text:h>
      <text:h text:style-name="Heading_20_3" text:outline-level="3">4.5.1 User Experience</text:h>
      <text:list text:continue-numbering="true" text:style-name="WWNum3">
        <text:list-item>
          <text:p text:style-name="P12">Intuitive interface requiring minimal learning curve</text:p>
        </text:list-item>
        <text:list-item>
          <text:p text:style-name="P12">Responsive design for all screen sizes</text:p>
        </text:list-item>
        <text:list-item>
          <text:p text:style-name="P12">Consistent navigation across platforms</text:p>
        </text:list-item>
        <text:list-item>
          <text:p text:style-name="P14">Dark mode support</text:p>
        </text:list-item>
      </text:list>
      <text:h text:style-name="Heading_20_3" text:outline-level="3">4.5.2 Accessibility (WCAG 2.1 AA)</text:h>
      <text:list text:continue-numbering="true" text:style-name="WWNum3">
        <text:list-item>
          <text:p text:style-name="P12">Screen reader compatibility</text:p>
        </text:list-item>
        <text:list-item>
          <text:p text:style-name="P12">Keyboard navigation support</text:p>
        </text:list-item>
        <text:list-item>
          <text:p text:style-name="P12">Color contrast ratio: minimum 4.5:1</text:p>
        </text:list-item>
        <text:list-item>
          <text:p text:style-name="P12">Text resizing support up to 200%</text:p>
        </text:list-item>
        <text:list-item>
          <text:p text:style-name="P11">Alternative text for all images</text:p>
        </text:list-item>
      </text:list>
      <text:h text:style-name="Heading_20_1" text:outline-level="1">5. User Interface Design</text:h>
      <text:h text:style-name="Heading_20_2" text:outline-level="2">5.1 Design Philosophy</text:h>
      <text:list text:continue-numbering="true" text:style-name="WWNum3">
        <text:list-item>
          <text:p text:style-name="P12">Clean, modern interface with minimal clutter</text:p>
        </text:list-item>
        <text:list-item>
          <text:p text:style-name="P12">Emphasis on data visualization and insights</text:p>
        </text:list-item>
        <text:list-item>
          <text:p text:style-name="P12">Consistent design patterns across all platforms</text:p>
        </text:list-item>
        <text:list-item>
          <text:p text:style-name="P11">Mobile-first responsive design approach</text:p>
        </text:list-item>
      </text:list>
      <text:h text:style-name="Heading_20_2" text:outline-level="2">5.2 Color Scheme</text:h>
      <table:table table:name="Table1" table:style-name="Table1">
        <table:table-column table:style-name="Table1.A" table:number-columns-repeated="4"/>
        <table:table-row table:style-name="Table1.1">
          <table:table-cell table:style-name="Table1.A1" office:value-type="string">
            <text:p text:style-name="P15">Color Name</text:p>
          </table:table-cell>
          <table:table-cell table:style-name="Table1.A1" office:value-type="string">
            <text:p text:style-name="P15">Hex Code</text:p>
          </table:table-cell>
          <table:table-cell table:style-name="Table1.A1" office:value-type="string">
            <text:p text:style-name="P15">RGB</text:p>
          </table:table-cell>
          <table:table-cell table:style-name="Table1.A1" office:value-type="string">
            <text:p text:style-name="P15">Usage</text:p>
          </table:table-cell>
        </table:table-row>
        <table:table-row table:style-name="Table1.1">
          <table:table-cell table:style-name="Table1.A2" office:value-type="string">
            <text:p text:style-name="P16">Primary Blue</text:p>
          </table:table-cell>
          <table:table-cell table:style-name="Table1.A2" office:value-type="string">
            <text:p text:style-name="P16">#2E75B6</text:p>
          </table:table-cell>
          <table:table-cell table:style-name="Table1.A2" office:value-type="string">
            <text:p text:style-name="P16">46, 117, 182</text:p>
          </table:table-cell>
          <table:table-cell table:style-name="Table1.A2" office:value-type="string">
            <text:p text:style-name="P16">Main brand color, buttons</text:p>
          </table:table-cell>
        </table:table-row>
        <table:table-row table:style-name="Table1.1">
          <table:table-cell table:style-name="Table1.A2" office:value-type="string">
            <text:p text:style-name="P16">Dark Blue</text:p>
          </table:table-cell>
          <table:table-cell table:style-name="Table1.A2" office:value-type="string">
            <text:p text:style-name="P16">#1F4E78</text:p>
          </table:table-cell>
          <table:table-cell table:style-name="Table1.A2" office:value-type="string">
            <text:p text:style-name="P16">31, 78, 120</text:p>
          </table:table-cell>
          <table:table-cell table:style-name="Table1.A2" office:value-type="string">
            <text:p text:style-name="P16">Headings, dark accents</text:p>
          </table:table-cell>
        </table:table-row>
        <table:table-row table:style-name="Table1.1">
          <table:table-cell table:style-name="Table1.A2" office:value-type="string">
            <text:p text:style-name="P16">Light Blue</text:p>
          </table:table-cell>
          <table:table-cell table:style-name="Table1.A2" office:value-type="string">
            <text:p text:style-name="P16">#D5E8F0</text:p>
          </table:table-cell>
          <table:table-cell table:style-name="Table1.A2" office:value-type="string">
            <text:p text:style-name="P16">213, 232, 240</text:p>
          </table:table-cell>
          <table:table-cell table:style-name="Table1.A2" office:value-type="string">
            <text:p text:style-name="P16">Backgrounds, hover states</text:p>
          </table:table-cell>
        </table:table-row>
        <table:table-row table:style-name="Table1.1">
          <table:table-cell table:style-name="Table1.A2" office:value-type="string">
            <text:p text:style-name="P16">Success Green</text:p>
          </table:table-cell>
          <table:table-cell table:style-name="Table1.A2" office:value-type="string">
            <text:p text:style-name="P16">#27AE60</text:p>
          </table:table-cell>
          <table:table-cell table:style-name="Table1.A2" office:value-type="string">
            <text:p text:style-name="P16">39, 174, 96</text:p>
          </table:table-cell>
          <table:table-cell table:style-name="Table1.A2" office:value-type="string">
            <text:p text:style-name="P16">Income, positive metrics</text:p>
          </table:table-cell>
        </table:table-row>
        <table:table-row table:style-name="Table1.1">
          <table:table-cell table:style-name="Table1.A2" office:value-type="string">
            <text:p text:style-name="P16">Warning Red</text:p>
          </table:table-cell>
          <table:table-cell table:style-name="Table1.A2" office:value-type="string">
            <text:p text:style-name="P16">#E74C3C</text:p>
          </table:table-cell>
          <table:table-cell table:style-name="Table1.A2" office:value-type="string">
            <text:p text:style-name="P16">231, 76, 60</text:p>
          </table:table-cell>
          <table:table-cell table:style-name="Table1.A2" office:value-type="string">
            <text:p text:style-name="P16">Expenses, budget overrun</text:p>
          </table:table-cell>
        </table:table-row>
        <table:table-row table:style-name="Table1.1">
          <table:table-cell table:style-name="Table1.A2" office:value-type="string">
            <text:p text:style-name="P16">Warning Yellow</text:p>
          </table:table-cell>
          <table:table-cell table:style-name="Table1.A2" office:value-type="string">
            <text:p text:style-name="P16">#F39C12</text:p>
          </table:table-cell>
          <table:table-cell table:style-name="Table1.A2" office:value-type="string">
            <text:p text:style-name="P16">243, 156, 18</text:p>
          </table:table-cell>
          <table:table-cell table:style-name="Table1.A2" office:value-type="string">
            <text:p text:style-name="P16">Budget approaching limit</text:p>
          </table:table-cell>
        </table:table-row>
        <table:table-row table:style-name="Table1.1">
          <table:table-cell table:style-name="Table1.A2" office:value-type="string">
            <text:p text:style-name="P16">Light Gray</text:p>
          </table:table-cell>
          <table:table-cell table:style-name="Table1.A2" office:value-type="string">
            <text:p text:style-name="P16">#F5F5F5</text:p>
          </table:table-cell>
          <table:table-cell table:style-name="Table1.A2" office:value-type="string">
            <text:p text:style-name="P16">245, 245, 245</text:p>
          </table:table-cell>
          <table:table-cell table:style-name="Table1.A2" office:value-type="string">
            <text:p text:style-name="P17"><text:span text:style-name="T1">Backgrounds, sidebar</text:span></text:p>
          </table:table-cell>
        </table:table-row>
        <table:table-row table:style-name="Table1.1">
          <table:table-cell table:style-name="Table1.A2" office:value-type="string">
            <text:p text:style-name="P16">Dark Gray</text:p>
          </table:table-cell>
          <table:table-cell table:style-name="Table1.A2" office:value-type="string">
            <text:p text:style-name="P16">#333333</text:p>
          </table:table-cell>
          <table:table-cell table:style-name="Table1.A2" office:value-type="string">
            <text:p text:style-name="P16">51, 51, 51</text:p>
          </table:table-cell>
          <table:table-cell table:style-name="Table1.A2" office:value-type="string">
            <text:p text:style-name="P16">Body text, dark text</text:p>
          </table:table-cell>
        </table:table-row>
      </table:table>
      <text:p text:style-name="P18"/>
      <text:h text:style-name="Heading_20_2" text:outline-level="2">5.3 Typography</text:h>
      <text:list text:continue-numbering="true" text:style-name="WWNum3">
        <text:list-item>
          <text:p text:style-name="P12">Primary Font: Inter (sans-serif) for body and UI</text:p>
        </text:list-item>
        <text:list-item>
          <text:p text:style-name="P12"><text:soft-page-break/>Secondary Font: Playfair Display (serif) for headings (optional, premium feel)</text:p>
        </text:list-item>
        <text:list-item>
          <text:p text:style-name="P12">Heading 1: 32px, Bold, Color #1F4E78</text:p>
        </text:list-item>
        <text:list-item>
          <text:p text:style-name="P12">Heading 2: 24px, Bold, Color #2E75B6</text:p>
        </text:list-item>
        <text:list-item>
          <text:p text:style-name="P12">Body Text: 14px, Regular, Color #333333</text:p>
        </text:list-item>
        <text:list-item>
          <text:p text:style-name="P11">Small Text: 12px, Regular, Color #666666</text:p>
        </text:list-item>
      </text:list>
      <text:h text:style-name="Heading_20_2" text:outline-level="2">5.4 Dashboard Layout</text:h>
      <text:h text:style-name="Heading_20_3" text:outline-level="3">5.4.1 Layout Structure</text:h>
      <text:p text:style-name="P9">The dashboard follows a three-section layout:</text:p>
      <text:h text:style-name="Heading_20_3" text:outline-level="3">5.4.2 Header Section</text:h>
      <text:p text:style-name="P19">Location: Top of page</text:p>
      <text:p text:style-name="P20">Height: 60px</text:p>
      <text:p text:style-name="P20">Background: White (#FFFFFF) with subtle shadow</text:p>
      <text:list text:continue-numbering="true" text:style-name="WWNum3">
        <text:list-item>
          <text:p text:style-name="P12">Left side: Application logo and name</text:p>
        </text:list-item>
        <text:list-item>
          <text:p text:style-name="P12">Center: Month/period selector dropdown</text:p>
        </text:list-item>
        <text:list-item>
          <text:p text:style-name="P12">Right side: User profile menu (avatar), notifications bell, settings gear</text:p>
        </text:list-item>
        <text:list-item>
          <text:p text:style-name="P11">All items aligned vertically centered</text:p>
        </text:list-item>
      </text:list>
      <text:h text:style-name="Heading_20_3" text:outline-level="3">5.4.3 Sidebar Navigation (Web &amp; Desktop)</text:h>
      <text:p text:style-name="P19">Location: Left side of screen</text:p>
      <text:p text:style-name="P20">Width: 250px (collapsible to 60px on compact view)</text:p>
      <text:p text:style-name="P20">Background: Light gray (#F5F5F5)</text:p>
      <text:p text:style-name="P20">Border-right: 1px solid #DDDDDD</text:p>
      <text:list text:continue-numbering="true" text:style-name="WWNum3">
        <text:list-item>
          <text:p text:style-name="P12">Menu Items (top to bottom):</text:p>
        </text:list-item>
        <text:list-item>
          <text:p text:style-name="P12">Dashboard (icon: chart-bar)</text:p>
        </text:list-item>
        <text:list-item>
          <text:p text:style-name="P12">Transactions (icon: list)</text:p>
        </text:list-item>
        <text:list-item>
          <text:p text:style-name="P12">Budget (icon: wallet)</text:p>
        </text:list-item>
        <text:list-item>
          <text:p text:style-name="P12">Recurring (icon: repeat)</text:p>
        </text:list-item>
        <text:list-item>
          <text:p text:style-name="P12">Reports (icon: chart-line)</text:p>
        </text:list-item>
        <text:list-item>
          <text:p text:style-name="P12">Categories (icon: tag)</text:p>
        </text:list-item>
        <text:list-item>
          <text:p text:style-name="P12">Settings (icon: gear)</text:p>
        </text:list-item>
        <text:list-item>
          <text:p text:style-name="P14">Logout (icon: sign-out)</text:p>
        </text:list-item>
      </text:list>
      <text:p text:style-name="P9">Active menu item: Bold text with left border accent (4px #2E75B6)</text:p>
      <text:h text:style-name="Heading_20_3" text:outline-level="3">5.4.4 Main Content Area (Dashboard)</text:h>
      <text:p text:style-name="P19">Location: Right of sidebar (or full width on mobile)</text:p>
      <text:p text:style-name="P20">Padding: 24px</text:p>
      <text:p text:style-name="P9">Grid Layout: 12 columns, responsive (4 cols on mobile, 6 on tablet, 12 on desktop)</text:p>
      <text:h text:style-name="Heading_20_3" text:outline-level="3">5.4.5 Dashboard Cards (Top Section)</text:h>
      <text:p text:style-name="P19">Layout: 4 stat cards in a row (2 cards on mobile, 2-4 on tablet)</text:p>
      <text:p text:style-name="P20">Each card height: 120px</text:p>
      <text:p text:style-name="P20">Card 1 - Income</text:p>
      <text:list text:continue-numbering="true" text:style-name="WWNum3">
        <text:list-item>
          <text:p text:style-name="P12">Title: "Total Income"</text:p>
        </text:list-item>
        <text:list-item>
          <text:p text:style-name="P12">Large amount displayed in green (#27AE60)</text:p>
        </text:list-item>
        <text:list-item>
          <text:p text:style-name="P12">Trend: Up arrow with percentage (e.g., "+5.2%" in green)</text:p>
        </text:list-item>
        <text:list-item>
          <text:p text:style-name="P14"><text:soft-page-break/>Icon: Money bag icon in top-right corner</text:p>
        </text:list-item>
      </text:list>
      <text:p text:style-name="P20">Card 2 - Expenses</text:p>
      <text:list text:continue-numbering="true" text:style-name="WWNum3">
        <text:list-item>
          <text:p text:style-name="P12">Title: "Total Expenses"</text:p>
        </text:list-item>
        <text:list-item>
          <text:p text:style-name="P12">Large amount displayed in red (#E74C3C)</text:p>
        </text:list-item>
        <text:list-item>
          <text:p text:style-name="P12">Trend: Down arrow with percentage in green (good) or up arrow in red (bad)</text:p>
        </text:list-item>
        <text:list-item>
          <text:p text:style-name="P14">Icon: Shopping bag icon</text:p>
        </text:list-item>
      </text:list>
      <text:p text:style-name="P20">Card 3 - Net Balance</text:p>
      <text:list text:continue-numbering="true" text:style-name="WWNum3">
        <text:list-item>
          <text:p text:style-name="P12">Title: "Net Balance"</text:p>
        </text:list-item>
        <text:list-item>
          <text:p text:style-name="P12">Large amount in blue (#2E75B6)</text:p>
        </text:list-item>
        <text:list-item>
          <text:p text:style-name="P12">Formula: Income - Expenses</text:p>
        </text:list-item>
        <text:list-item>
          <text:p text:style-name="P14">Icon: Wallet icon</text:p>
        </text:list-item>
      </text:list>
      <text:p text:style-name="P20">Card 4 - Savings Rate</text:p>
      <text:list text:continue-numbering="true" text:style-name="WWNum3">
        <text:list-item>
          <text:p text:style-name="P12">Title: "Savings Rate"</text:p>
        </text:list-item>
        <text:list-item>
          <text:p text:style-name="P12">Large percentage in purple (#9B59B6)</text:p>
        </text:list-item>
        <text:list-item>
          <text:p text:style-name="P12">Formula: (Income - Expenses) / Income × 100</text:p>
        </text:list-item>
        <text:list-item>
          <text:p text:style-name="P11">Icon: Target icon</text:p>
        </text:list-item>
      </text:list>
      <text:p text:style-name="P9">Card styling: White background (#FFFFFF), rounded corners (8px), subtle shadow, padding 16px</text:p>
      <text:h text:style-name="Heading_20_3" text:outline-level="3">5.4.6 Charts Section (Middle)</text:h>
      <text:p text:style-name="P19">Two-column grid layout on desktop, stacked on mobile</text:p>
      <text:p text:style-name="P20">Left Chart - Category Breakdown (Pie Chart)</text:p>
      <text:list text:continue-numbering="true" text:style-name="WWNum3">
        <text:list-item>
          <text:p text:style-name="P12">Title: "Spending by Category"</text:p>
        </text:list-item>
        <text:list-item>
          <text:p text:style-name="P12">Height: 300px</text:p>
        </text:list-item>
        <text:list-item>
          <text:p text:style-name="P12">Pie chart with color-coded slices</text:p>
        </text:list-item>
        <text:list-item>
          <text:p text:style-name="P12">Legend below chart with category names and percentages</text:p>
        </text:list-item>
        <text:list-item>
          <text:p text:style-name="P14">Interactive: Hover to highlight slice and show tooltip</text:p>
        </text:list-item>
      </text:list>
      <text:p text:style-name="P20">Right Chart - Monthly Trend (Line Chart)</text:p>
      <text:list text:continue-numbering="true" text:style-name="WWNum3">
        <text:list-item>
          <text:p text:style-name="P12">Title: "Income vs Expenses Trend (Last 12 Months)"</text:p>
        </text:list-item>
        <text:list-item>
          <text:p text:style-name="P12">Height: 300px</text:p>
        </text:list-item>
        <text:list-item>
          <text:p text:style-name="P12">Two lines: Income (green #27AE60), Expenses (red #E74C3C)</text:p>
        </text:list-item>
        <text:list-item>
          <text:p text:style-name="P12">X-axis: Month labels</text:p>
        </text:list-item>
        <text:list-item>
          <text:p text:style-name="P12">Y-axis: Amount in currency</text:p>
        </text:list-item>
        <text:list-item>
          <text:p text:style-name="P11">Interactive: Hover for tooltip with exact values</text:p>
        </text:list-item>
      </text:list>
      <text:h text:style-name="Heading_20_3" text:outline-level="3">5.4.7 Top Spending Categories Table (Bottom)</text:h>
      <text:p text:style-name="P19">Full width</text:p>
      <text:p text:style-name="P20">Title: "Top Spending Categories"</text:p>
      <text:p text:style-name="P20">Columns: Rank | Category | Amount | Percentage | Progress Bar</text:p>
      <text:p text:style-name="P20">Show top 5 categories by amount</text:p>
      <text:p text:style-name="P20">Progress bar shows percentage of total spending</text:p>
      <text:list text:continue-numbering="true" text:style-name="WWNum3">
        <text:list-item>
          <text:p text:style-name="P12">Row styling: Alternate light gray (#F9F9F9) and white rows</text:p>
        </text:list-item>
        <text:list-item>
          <text:p text:style-name="P11">Hover effect: Light blue background on row</text:p>
        </text:list-item>
      </text:list>
      <text:h text:style-name="Heading_20_2" text:outline-level="2">5.5 Add Transaction Page</text:h>
      <text:h text:style-name="Heading_20_3" text:outline-level="3">5.5.1 Form Layout</text:h>
      <text:p text:style-name="P19">Modal dialog or dedicated page</text:p>
      <text:p text:style-name="P20"><text:soft-page-break/>Two tabs: Expense | Income</text:p>
      <text:p text:style-name="P9">Single-column form layout on all devices</text:p>
      <text:h text:style-name="Heading_20_3" text:outline-level="3">5.5.2 Expense Form Fields</text:h>
      <text:p text:style-name="P19">Amount (required)</text:p>
      <text:list text:continue-numbering="true" text:style-name="WWNum3">
        <text:list-item>
          <text:p text:style-name="P12">Type: Number input with currency symbol prefix</text:p>
        </text:list-item>
        <text:list-item>
          <text:p text:style-name="P12">Placeholder: "0.00"</text:p>
        </text:list-item>
        <text:list-item>
          <text:p text:style-name="P14">Validation: Must be &gt; 0, max 2 decimal places</text:p>
        </text:list-item>
      </text:list>
      <text:p text:style-name="P20">Category (required)</text:p>
      <text:list text:continue-numbering="true" text:style-name="WWNum3">
        <text:list-item>
          <text:p text:style-name="P12">Type: Dropdown with icons</text:p>
        </text:list-item>
        <text:list-item>
          <text:p text:style-name="P12">Show predefined + user custom categories</text:p>
        </text:list-item>
        <text:list-item>
          <text:p text:style-name="P14">Default: Most recently used category</text:p>
        </text:list-item>
      </text:list>
      <text:p text:style-name="P20">Date (required)</text:p>
      <text:list text:continue-numbering="true" text:style-name="WWNum3">
        <text:list-item>
          <text:p text:style-name="P12">Type: Date &amp; time picker</text:p>
        </text:list-item>
        <text:list-item>
          <text:p text:style-name="P12">Default: Current date &amp; time</text:p>
        </text:list-item>
        <text:list-item>
          <text:p text:style-name="P14">Allow manual input or calendar popup</text:p>
        </text:list-item>
      </text:list>
      <text:p text:style-name="P20">Description (optional)</text:p>
      <text:list text:continue-numbering="true" text:style-name="WWNum3">
        <text:list-item>
          <text:p text:style-name="P12">Type: Text area</text:p>
        </text:list-item>
        <text:list-item>
          <text:p text:style-name="P12">Max 500 characters</text:p>
        </text:list-item>
        <text:list-item>
          <text:p text:style-name="P14">Placeholder: "Add notes (optional)"</text:p>
        </text:list-item>
      </text:list>
      <text:p text:style-name="P20">Payment Method (required)</text:p>
      <text:list text:continue-numbering="true" text:style-name="WWNum3">
        <text:list-item>
          <text:p text:style-name="P12">Type: Radio buttons or segmented control</text:p>
        </text:list-item>
        <text:list-item>
          <text:p text:style-name="P12">Options: Cash | Credit Card | Debit Card | Digital Wallet | Bank Transfer</text:p>
        </text:list-item>
        <text:list-item>
          <text:p text:style-name="P14">Default: Most recently used method</text:p>
        </text:list-item>
      </text:list>
      <text:p text:style-name="P9">Vendor/Recipient (optional)</text:p>
      <text:list text:continue-numbering="true" text:style-name="WWNum3">
        <text:list-item>
          <text:p text:style-name="P12">Type: Text input</text:p>
        </text:list-item>
        <text:list-item>
          <text:p text:style-name="P12">Autocomplete from previous vendors</text:p>
        </text:list-item>
        <text:list-item>
          <text:p text:style-name="P11">Placeholder: "Enter vendor or recipient name"</text:p>
        </text:list-item>
      </text:list>
      <text:h text:style-name="Heading_20_3" text:outline-level="3">5.5.3 Form Buttons</text:h>
      <text:p text:style-name="P19">Save (primary button)</text:p>
      <text:list text:continue-numbering="true" text:style-name="WWNum3">
        <text:list-item>
          <text:p text:style-name="P12">Background: #2E75B6</text:p>
        </text:list-item>
        <text:list-item>
          <text:p text:style-name="P12">Text: White</text:p>
        </text:list-item>
        <text:list-item>
          <text:p text:style-name="P14">Disabled if form is invalid</text:p>
        </text:list-item>
      </text:list>
      <text:p text:style-name="P20">Cancel (secondary button)</text:p>
      <text:list text:continue-numbering="true" text:style-name="WWNum3">
        <text:list-item>
          <text:p text:style-name="P12">Background: #F5F5F5</text:p>
        </text:list-item>
        <text:list-item>
          <text:p text:style-name="P12">Text: #333333</text:p>
        </text:list-item>
        <text:list-item>
          <text:p text:style-name="P14">Border: 1px solid #DDDDDD</text:p>
        </text:list-item>
      </text:list>
      <text:p text:style-name="P9">Buttons layout: Side by side on desktop, stacked on mobile</text:p>
      <text:h text:style-name="Heading_20_2" text:outline-level="2">5.6 Transactions List Page</text:h>
      <text:h text:style-name="Heading_20_3" text:outline-level="3">5.6.1 Filter Bar</text:h>
      <text:p text:style-name="P19">Position: Top, sticky on scroll</text:p>
      <text:p text:style-name="P20">Background: White with bottom border #DDDDDD</text:p>
      <text:p text:style-name="P20">Search field (full-width or left-aligned)</text:p>
      <text:list text:continue-numbering="true" text:style-name="WWNum3">
        <text:list-item>
          <text:p text:style-name="P12"><text:soft-page-break/>Placeholder: "Search transactions..."</text:p>
        </text:list-item>
        <text:list-item>
          <text:p text:style-name="P14">Icon: Magnifying glass on left</text:p>
        </text:list-item>
      </text:list>
      <text:p text:style-name="P20">Filter buttons (inline or dropdown):</text:p>
      <text:list text:continue-numbering="true" text:style-name="WWNum3">
        <text:list-item>
          <text:p text:style-name="P12">Date range selector</text:p>
        </text:list-item>
        <text:list-item>
          <text:p text:style-name="P12">Category filter (multi-select dropdown)</text:p>
        </text:list-item>
        <text:list-item>
          <text:p text:style-name="P11">Amount range slider</text:p>
        </text:list-item>
      </text:list>
      <text:h text:style-name="Heading_20_3" text:outline-level="3">5.6.2 Transactions List</text:h>
      <text:p text:style-name="P19">Display format: Card-based list (mobile) or table (desktop)</text:p>
      <text:p text:style-name="P20">Columns (desktop table): Date | Vendor | Category | Amount | Payment Method | Description</text:p>
      <text:p text:style-name="P20">Card view (mobile):</text:p>
      <text:list text:continue-numbering="true" text:style-name="WWNum3">
        <text:list-item>
          <text:p text:style-name="P12">Left: Category icon and name</text:p>
        </text:list-item>
        <text:list-item>
          <text:p text:style-name="P12">Center: Vendor name and date</text:p>
        </text:list-item>
        <text:list-item>
          <text:p text:style-name="P14">Right: Amount in red for expense, green for income</text:p>
        </text:list-item>
      </text:list>
      <text:p text:style-name="P20">Row interactions:</text:p>
      <text:list text:continue-numbering="true" text:style-name="WWNum3">
        <text:list-item>
          <text:p text:style-name="P12">Click to view details modal</text:p>
        </text:list-item>
        <text:list-item>
          <text:p text:style-name="P12">Swipe left (mobile) to reveal delete and edit actions</text:p>
        </text:list-item>
        <text:list-item>
          <text:p text:style-name="P14">Hover (desktop) to show action buttons (Edit, Delete)</text:p>
        </text:list-item>
      </text:list>
      <text:p text:style-name="P9">Pagination: Show 20 items per page, with load more button or infinite scroll</text:p>
      <text:h text:style-name="Heading_20_2" text:outline-level="2">5.7 Budget Page</text:h>
      <text:h text:style-name="Heading_20_3" text:outline-level="3">5.7.1 Budget Overview Card</text:h>
      <text:p text:style-name="P19">Overall monthly budget display</text:p>
      <text:p text:style-name="P20">Large circular progress indicator</text:p>
      <text:p text:style-name="P20">Display: "X of Y spent (Z%)"</text:p>
      <text:p text:style-name="P9">Color: Green for under budget, yellow for warning, red for over</text:p>
      <text:h text:style-name="Heading_20_3" text:outline-level="3">5.7.2 Category Budget Cards</text:h>
      <text:p text:style-name="P19">Grid layout: 2 columns (desktop), 1 column (mobile)</text:p>
      <text:p text:style-name="P20">Each card shows:</text:p>
      <text:list text:continue-numbering="true" text:style-name="WWNum3">
        <text:list-item>
          <text:p text:style-name="P12">Category name with icon</text:p>
        </text:list-item>
        <text:list-item>
          <text:p text:style-name="P12">Budget amount and spent amount</text:p>
        </text:list-item>
        <text:list-item>
          <text:p text:style-name="P12">Horizontal progress bar with status color</text:p>
        </text:list-item>
        <text:list-item>
          <text:p text:style-name="P12">Edit button to modify budget</text:p>
        </text:list-item>
        <text:list-item>
          <text:p text:style-name="P11">Remaining amount in gray text</text:p>
        </text:list-item>
      </text:list>
      <text:h text:style-name="Heading_20_2" text:outline-level="2">5.8 Reports Page</text:h>
      <text:h text:style-name="Heading_20_3" text:outline-level="3">5.8.1 Report Generation</text:h>
      <text:p text:style-name="P19">Date range selector at top</text:p>
      <text:p text:style-name="P20">Report type selector: Monthly | Custom Range</text:p>
      <text:p text:style-name="P20">Generate button</text:p>
      <text:p text:style-name="P9">Export buttons: CSV | PDF</text:p>
      <text:h text:style-name="Heading_20_3" text:outline-level="3">5.8.2 Report Display</text:h>
      <text:p text:style-name="P19">Summary section: Total income, total expenses, net balance</text:p>
      <text:p text:style-name="P20"><text:soft-page-break/>Category breakdown table with amount and percentage</text:p>
      <text:p text:style-name="P20">Charts: Pie chart and bar chart of categories</text:p>
      <text:p text:style-name="P9">Transactions table: All transactions in the date range</text:p>
      <text:h text:style-name="Heading_20_2" text:outline-level="2">5.9 Mobile Layout (Android)</text:h>
      <text:h text:style-name="Heading_20_3" text:outline-level="3">5.9.1 Navigation</text:h>
      <text:p text:style-name="P19">Bottom tab bar navigation</text:p>
      <text:p text:style-name="P20">5 main tabs: Home | Transactions | Budget | Reports | Menu</text:p>
      <text:p text:style-name="P20">Active tab: Highlighted icon and text</text:p>
      <text:p text:style-name="P9">Floating Action Button (FAB) for adding transaction</text:p>
      <text:h text:style-name="Heading_20_3" text:outline-level="3">5.9.2 Layout Adjustments</text:h>
      <text:p text:style-name="P19">Dashboard: Vertical stack of all cards and charts</text:p>
      <text:p text:style-name="P20">Stat cards: Full width, visible one per row</text:p>
      <text:p text:style-name="P20">Charts: Full width, optimized for portrait view</text:p>
      <text:p text:style-name="P9">Sidebar: Hidden, accessible via hamburger menu</text:p>
      <text:h text:style-name="Heading_20_1" text:outline-level="1">6. Technical Architecture</text:h>
      <text:h text:style-name="Heading_20_2" text:outline-level="2">6.1 Technology Stack</text:h>
      <text:p text:style-name="P9">All development will be done exclusively using Claude Code with Python as the primary programming language. The following technologies are selected for their ease of integration with Claude Code and free/open-source availabilit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mponent</text:p>
          </table:table-cell>
          <table:table-cell table:style-name="Table2.A1" office:value-type="string">
            <text:p text:style-name="P15">Technology</text:p>
          </table:table-cell>
          <table:table-cell table:style-name="Table2.A1" office:value-type="string">
            <text:p text:style-name="P15">Details</text:p>
          </table:table-cell>
        </table:table-row>
        <table:table-row table:style-name="Table2.1">
          <table:table-cell table:style-name="Table2.A2" office:value-type="string">
            <text:p text:style-name="P16">Backend (API Server)</text:p>
          </table:table-cell>
          <table:table-cell table:style-name="Table2.A2" office:value-type="string">
            <text:p text:style-name="P16">Python + Flask/FastAPI</text:p>
          </table:table-cell>
          <table:table-cell table:style-name="Table2.C2" office:value-type="string">
            <text:p text:style-name="P16">Lightweight, easy to deploy, perfect for Claude Code development. Free and open-source</text:p>
          </table:table-cell>
        </table:table-row>
        <table:table-row table:style-name="Table2.1">
          <table:table-cell table:style-name="Table2.A2" office:value-type="string">
            <text:p text:style-name="P16">Frontend (Web)</text:p>
          </table:table-cell>
          <table:table-cell table:style-name="Table2.A2" office:value-type="string">
            <text:p text:style-name="P16">HTML5, CSS3, Vanilla JavaScript</text:p>
          </table:table-cell>
          <table:table-cell table:style-name="Table2.C2" office:value-type="string">
            <text:p text:style-name="P16">Pure JavaScript for interactivity, no external framework dependencies required</text:p>
          </table:table-cell>
        </table:table-row>
        <table:table-row table:style-name="Table2.1">
          <table:table-cell table:style-name="Table2.A2" office:value-type="string">
            <text:p text:style-name="P16">Mobile</text:p>
          </table:table-cell>
          <table:table-cell table:style-name="Table2.A2" office:value-type="string">
            <text:p text:style-name="P16">React Native (JavaScript)</text:p>
          </table:table-cell>
          <table:table-cell table:style-name="Table2.C2" office:value-type="string">
            <text:p text:style-name="P16">Code sharing with web, free framework, Android support built-in</text:p>
          </table:table-cell>
        </table:table-row>
        <table:table-row table:style-name="Table2.1">
          <table:table-cell table:style-name="Table2.A2" office:value-type="string">
            <text:p text:style-name="P16">Database</text:p>
          </table:table-cell>
          <table:table-cell table:style-name="Table2.A2" office:value-type="string">
            <text:p text:style-name="P16">SQLite (or PostgreSQL if needed)</text:p>
          </table:table-cell>
          <table:table-cell table:style-name="Table2.C2" office:value-type="string">
            <text:p text:style-name="P16">SQLite: Embedded, zero-configuration, file-based. PostgreSQL: Free, open-source for advanced needs</text:p>
          </table:table-cell>
        </table:table-row>
        <table:table-row table:style-name="Table2.1">
          <table:table-cell table:style-name="Table2.A2" office:value-type="string">
            <text:p text:style-name="P17"><text:span text:style-name="T1">Data Visualization</text:span></text:p>
          </table:table-cell>
          <table:table-cell table:style-name="Table2.A2" office:value-type="string">
            <text:p text:style-name="P16">Chart.js / Plotly (JavaScript)</text:p>
          </table:table-cell>
          <table:table-cell table:style-name="Table2.C2" office:value-type="string">
            <text:p text:style-name="P17"><text:span text:style-name="T1">Free, open-source charting libraries with excellent browser support</text:span></text:p>
          </table:table-cell>
        </table:table-row>
        <table:table-row table:style-name="Table2.1">
          <table:table-cell table:style-name="Table2.A2" office:value-type="string">
            <text:p text:style-name="P16">Authentication</text:p>
          </table:table-cell>
          <table:table-cell table:style-name="Table2.A2" office:value-type="string">
            <text:p text:style-name="P16">JWT (JSON Web Tokens) + bcrypt</text:p>
          </table:table-cell>
          <table:table-cell table:style-name="Table2.C2" office:value-type="string">
            <text:p text:style-name="P16">Standard, free, Python bcrypt library for secure password hashing</text:p>
          </table:table-cell>
        </table:table-row>
        <table:table-row table:style-name="Table2.1">
          <table:table-cell table:style-name="Table2.A2" office:value-type="string">
            <text:p text:style-name="P16">Export (PDF/CSV)</text:p>
          </table:table-cell>
          <table:table-cell table:style-name="Table2.A2" office:value-type="string">
            <text:p text:style-name="P16">Python: ReportLab, python-pptx (Free libraries)</text:p>
          </table:table-cell>
          <table:table-cell table:style-name="Table2.C2" office:value-type="string">
            <text:p text:style-name="P16">ReportLab generates PDFs, CSV export via Python built-in csv module</text:p>
          </table:table-cell>
        </table:table-row>
        <text:soft-page-break/>
        <table:table-row table:style-name="Table2.1">
          <table:table-cell table:style-name="Table2.A2" office:value-type="string">
            <text:p text:style-name="P16">Scheduling (Recurring)</text:p>
          </table:table-cell>
          <table:table-cell table:style-name="Table2.A2" office:value-type="string">
            <text:p text:style-name="P16">APScheduler (Python)</text:p>
          </table:table-cell>
          <table:table-cell table:style-name="Table2.C2" office:value-type="string">
            <text:p text:style-name="P16">Free, open-source task scheduler for Python. Runs background jobs for recurring expenses</text:p>
          </table:table-cell>
        </table:table-row>
        <table:table-row table:style-name="Table2.1">
          <table:table-cell table:style-name="Table2.A2" office:value-type="string">
            <text:p text:style-name="P16">Deployment</text:p>
          </table:table-cell>
          <table:table-cell table:style-name="Table2.A2" office:value-type="string">
            <text:p text:style-name="P16">Local or free cloud (Heroku free tier, Render, etc.)</text:p>
          </table:table-cell>
          <table:table-cell table:style-name="Table2.C2" office:value-type="string">
            <text:p text:style-name="P16">Can be deployed locally or on free tier cloud services for testing. SQLite for local persistence</text:p>
          </table:table-cell>
        </table:table-row>
      </table:table>
      <text:p text:style-name="P18"/>
      <text:h text:style-name="Heading_20_2" text:outline-level="2">6.2 Architecture Overview</text:h>
      <text:list text:continue-numbering="true" text:style-name="WWNum3">
        <text:list-item>
          <text:p text:style-name="P12">Single-tier architecture optimized for Claude Code development</text:p>
        </text:list-item>
        <text:list-item>
          <text:p text:style-name="P12">Python backend with Flask/FastAPI for REST API</text:p>
        </text:list-item>
        <text:list-item>
          <text:p text:style-name="P12">SQLite or PostgreSQL for data persistence</text:p>
        </text:list-item>
        <text:list-item>
          <text:p text:style-name="P12">Frontend: HTML5, CSS3, and JavaScript (Vanilla JS or lightweight framework)</text:p>
        </text:list-item>
        <text:list-item>
          <text:p text:style-name="P11">All third-party services are free or open-source alternatives</text:p>
        </text:list-item>
      </text:list>
      <text:h text:style-name="Heading_20_2" text:outline-level="2">6.3 API Endpoints</text:h>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15">Method</text:p>
          </table:table-cell>
          <table:table-cell table:style-name="Table3.A1" office:value-type="string">
            <text:p text:style-name="P15">Endpoint</text:p>
          </table:table-cell>
          <table:table-cell table:style-name="Table3.A1" office:value-type="string">
            <text:p text:style-name="P15">Description</text:p>
          </table:table-cell>
          <table:table-cell table:style-name="Table3.A1" office:value-type="string">
            <text:p text:style-name="P15">Auth</text:p>
          </table:table-cell>
        </table:table-row>
        <table:table-row table:style-name="Table3.1">
          <table:table-cell table:style-name="Table3.A2" office:value-type="string">
            <text:p text:style-name="P16">POST</text:p>
          </table:table-cell>
          <table:table-cell table:style-name="Table3.A2" office:value-type="string">
            <text:p text:style-name="P16">/api/expenses</text:p>
          </table:table-cell>
          <table:table-cell table:style-name="Table3.A2" office:value-type="string">
            <text:p text:style-name="P16">Create new expense record</text:p>
          </table:table-cell>
          <table:table-cell table:style-name="Table3.A2" office:value-type="string">
            <text:p text:style-name="P16">Required</text:p>
          </table:table-cell>
        </table:table-row>
        <table:table-row table:style-name="Table3.1">
          <table:table-cell table:style-name="Table3.A2" office:value-type="string">
            <text:p text:style-name="P16">GET</text:p>
          </table:table-cell>
          <table:table-cell table:style-name="Table3.A2" office:value-type="string">
            <text:p text:style-name="P16">/api/expenses</text:p>
          </table:table-cell>
          <table:table-cell table:style-name="Table3.A2" office:value-type="string">
            <text:p text:style-name="P16">Retrieve expenses with filters (date, category, amount)</text:p>
          </table:table-cell>
          <table:table-cell table:style-name="Table3.A2" office:value-type="string">
            <text:p text:style-name="P16">Required</text:p>
          </table:table-cell>
        </table:table-row>
        <table:table-row table:style-name="Table3.1">
          <table:table-cell table:style-name="Table3.A2" office:value-type="string">
            <text:p text:style-name="P16">PUT</text:p>
          </table:table-cell>
          <table:table-cell table:style-name="Table3.A2" office:value-type="string">
            <text:p text:style-name="P16">/api/expenses/:id</text:p>
          </table:table-cell>
          <table:table-cell table:style-name="Table3.A2" office:value-type="string">
            <text:p text:style-name="P16">Update expense by ID</text:p>
          </table:table-cell>
          <table:table-cell table:style-name="Table3.A2" office:value-type="string">
            <text:p text:style-name="P16">Required</text:p>
          </table:table-cell>
        </table:table-row>
        <table:table-row table:style-name="Table3.1">
          <table:table-cell table:style-name="Table3.A2" office:value-type="string">
            <text:p text:style-name="P16">DELETE</text:p>
          </table:table-cell>
          <table:table-cell table:style-name="Table3.A2" office:value-type="string">
            <text:p text:style-name="P16">/api/expenses/:id</text:p>
          </table:table-cell>
          <table:table-cell table:style-name="Table3.A2" office:value-type="string">
            <text:p text:style-name="P16">Soft delete expense (mark as deleted)</text:p>
          </table:table-cell>
          <table:table-cell table:style-name="Table3.A2" office:value-type="string">
            <text:p text:style-name="P16">Required</text:p>
          </table:table-cell>
        </table:table-row>
        <table:table-row table:style-name="Table3.1">
          <table:table-cell table:style-name="Table3.A2" office:value-type="string">
            <text:p text:style-name="P16">POST</text:p>
          </table:table-cell>
          <table:table-cell table:style-name="Table3.A2" office:value-type="string">
            <text:p text:style-name="P16">/api/income</text:p>
          </table:table-cell>
          <table:table-cell table:style-name="Table3.A2" office:value-type="string">
            <text:p text:style-name="P16">Record income entry</text:p>
          </table:table-cell>
          <table:table-cell table:style-name="Table3.A2" office:value-type="string">
            <text:p text:style-name="P16">Required</text:p>
          </table:table-cell>
        </table:table-row>
        <table:table-row table:style-name="Table3.1">
          <table:table-cell table:style-name="Table3.A2" office:value-type="string">
            <text:p text:style-name="P16">GET</text:p>
          </table:table-cell>
          <table:table-cell table:style-name="Table3.A2" office:value-type="string">
            <text:p text:style-name="P16">/api/dashboard/summary</text:p>
          </table:table-cell>
          <table:table-cell table:style-name="Table3.A2" office:value-type="string">
            <text:p text:style-name="P16">Get dashboard metrics (income, expenses, balance, savings rate)</text:p>
          </table:table-cell>
          <table:table-cell table:style-name="Table3.A2" office:value-type="string">
            <text:p text:style-name="P16">Required</text:p>
          </table:table-cell>
        </table:table-row>
        <table:table-row table:style-name="Table3.1">
          <table:table-cell table:style-name="Table3.A2" office:value-type="string">
            <text:p text:style-name="P16">GET</text:p>
          </table:table-cell>
          <table:table-cell table:style-name="Table3.A2" office:value-type="string">
            <text:p text:style-name="P16">/api/analytics/trends</text:p>
          </table:table-cell>
          <table:table-cell table:style-name="Table3.A2" office:value-type="string">
            <text:p text:style-name="P16">Get monthly trend data for charts (last 12 months)</text:p>
          </table:table-cell>
          <table:table-cell table:style-name="Table3.A2" office:value-type="string">
            <text:p text:style-name="P16">Required</text:p>
          </table:table-cell>
        </table:table-row>
        <table:table-row table:style-name="Table3.1">
          <table:table-cell table:style-name="Table3.A2" office:value-type="string">
            <text:p text:style-name="P16">GET</text:p>
          </table:table-cell>
          <table:table-cell table:style-name="Table3.A2" office:value-type="string">
            <text:p text:style-name="P16">/api/analytics/categories</text:p>
          </table:table-cell>
          <table:table-cell table:style-name="Table3.A2" office:value-type="string">
            <text:p text:style-name="P16">Get spending breakdown by category for pie chart</text:p>
          </table:table-cell>
          <table:table-cell table:style-name="Table3.A2" office:value-type="string">
            <text:p text:style-name="P16">Required</text:p>
          </table:table-cell>
        </table:table-row>
        <table:table-row table:style-name="Table3.1">
          <table:table-cell table:style-name="Table3.A2" office:value-type="string">
            <text:p text:style-name="P16">POST</text:p>
          </table:table-cell>
          <table:table-cell table:style-name="Table3.A2" office:value-type="string">
            <text:p text:style-name="P16">/api/budgets</text:p>
          </table:table-cell>
          <table:table-cell table:style-name="Table3.A2" office:value-type="string">
            <text:p text:style-name="P16">Create or update category budget</text:p>
          </table:table-cell>
          <table:table-cell table:style-name="Table3.A2" office:value-type="string">
            <text:p text:style-name="P16">Required</text:p>
          </table:table-cell>
        </table:table-row>
        <table:table-row table:style-name="Table3.1">
          <table:table-cell table:style-name="Table3.A2" office:value-type="string">
            <text:p text:style-name="P16">GET</text:p>
          </table:table-cell>
          <table:table-cell table:style-name="Table3.A2" office:value-type="string">
            <text:p text:style-name="P16">/api/budgets</text:p>
          </table:table-cell>
          <table:table-cell table:style-name="Table3.A2" office:value-type="string">
            <text:p text:style-name="P16">Get all budgets with current spending status</text:p>
          </table:table-cell>
          <table:table-cell table:style-name="Table3.A2" office:value-type="string">
            <text:p text:style-name="P16">Required</text:p>
          </table:table-cell>
        </table:table-row>
        <table:table-row table:style-name="Table3.1">
          <table:table-cell table:style-name="Table3.A2" office:value-type="string">
            <text:p text:style-name="P16">POST</text:p>
          </table:table-cell>
          <table:table-cell table:style-name="Table3.A2" office:value-type="string">
            <text:p text:style-name="P16">/api/recurring</text:p>
          </table:table-cell>
          <table:table-cell table:style-name="Table3.A2" office:value-type="string">
            <text:p text:style-name="P16">Create recurring expense rule</text:p>
          </table:table-cell>
          <table:table-cell table:style-name="Table3.A2" office:value-type="string">
            <text:p text:style-name="P16">Required</text:p>
          </table:table-cell>
        </table:table-row>
        <table:table-row table:style-name="Table3.1">
          <table:table-cell table:style-name="Table3.A2" office:value-type="string">
            <text:p text:style-name="P16">GET</text:p>
          </table:table-cell>
          <table:table-cell table:style-name="Table3.A2" office:value-type="string">
            <text:p text:style-name="P16">/api/categories</text:p>
          </table:table-cell>
          <table:table-cell table:style-name="Table3.A2" office:value-type="string">
            <text:p text:style-name="P16">Get predefined and custom categories</text:p>
          </table:table-cell>
          <table:table-cell table:style-name="Table3.A2" office:value-type="string">
            <text:p text:style-name="P16">Required</text:p>
          </table:table-cell>
        </table:table-row>
        <table:table-row table:style-name="Table3.1">
          <table:table-cell table:style-name="Table3.A2" office:value-type="string">
            <text:p text:style-name="P16">POST</text:p>
          </table:table-cell>
          <table:table-cell table:style-name="Table3.A2" office:value-type="string">
            <text:p text:style-name="P16">/api/export/csv</text:p>
          </table:table-cell>
          <table:table-cell table:style-name="Table3.A2" office:value-type="string">
            <text:p text:style-name="P16">Export expenses to CSV file</text:p>
          </table:table-cell>
          <table:table-cell table:style-name="Table3.A2" office:value-type="string">
            <text:p text:style-name="P16">Required</text:p>
          </table:table-cell>
        </table:table-row>
        <text:soft-page-break/>
        <table:table-row table:style-name="Table3.1">
          <table:table-cell table:style-name="Table3.A2" office:value-type="string">
            <text:p text:style-name="P16">POST</text:p>
          </table:table-cell>
          <table:table-cell table:style-name="Table3.A2" office:value-type="string">
            <text:p text:style-name="P16">/api/export/pdf</text:p>
          </table:table-cell>
          <table:table-cell table:style-name="Table3.A2" office:value-type="string">
            <text:p text:style-name="P16">Generate and download PDF report</text:p>
          </table:table-cell>
          <table:table-cell table:style-name="Table3.A2" office:value-type="string">
            <text:p text:style-name="P16">Required</text:p>
          </table:table-cell>
        </table:table-row>
      </table:table>
      <text:p text:style-name="P21"/>
      <text:h text:style-name="Heading_20_1" text:outline-level="1">7. Security &amp; Privacy</text:h>
      <text:h text:style-name="Heading_20_2" text:outline-level="2">7.1 Authentication</text:h>
      <text:h text:style-name="Heading_20_3" text:outline-level="3">7.1.1 User Authentication</text:h>
      <text:list text:continue-numbering="true" text:style-name="WWNum3">
        <text:list-item>
          <text:p text:style-name="P12">Email/password registration with strong password requirements</text:p>
        </text:list-item>
        <text:list-item>
          <text:p text:style-name="P11">Secure password hashing using bcrypt with salt</text:p>
        </text:list-item>
      </text:list>
      <text:p text:style-name="P22">--- END OF DOCUME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423cm" fo:margin-bottom="0.212cm" style:contextual-spacing="false"/>
      <style:text-properties fo:color="#1f4e78"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353cm" fo:margin-bottom="0.176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282cm" fo:margin-bottom="0.141cm" style:contextual-spacing="false"/>
      <style:text-properties fo:color="#4472c4"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6-09T00:22:25.524000000</meta:creation-date>
    <dc:date>2026-06-09T00:22:25.525000000</dc:date>
    <meta:generator>LibreOffice/26.2.4.2$Windows_X86_64 LibreOffice_project/0229ac93fcf0d7cbc6376066c6f35021cef002dc</meta:generator>
    <meta:document-statistic meta:table-count="3" meta:image-count="0" meta:object-count="0" meta:page-count="13" meta:paragraph-count="543" meta:word-count="2900" meta:character-count="18234" meta:non-whitespace-character-count="16127"/>
  </office:meta>
</office:document-meta>
</file>